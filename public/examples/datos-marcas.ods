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id">
            <text:p>id</text:p>
          </table:table-cell>
          <table:table-cell table:style-name="pd1" office:value-type="string" office:string-value="brand">
            <text:p>brand</text:p>
          </table:table-cell>
          <table:table-cell table:style-name="pd1" office:value-type="string" office:string-value="model">
            <text:p>model</text:p>
          </table:table-cell>
          <table:table-cell table:style-name="pd1" office:value-type="string" office:string-value="year">
            <text:p>year</text:p>
          </table:table-cell>
          <table:table-cell table:style-name="pd1" office:value-type="string" office:string-value="imageKey">
            <text:p>imageKey</text:p>
          </table:table-cell>
        </table:table-row>
        <table:table-row>
          <table:table-cell office:value-type="string" office:string-value="ford-mustang-gt-2014">
            <text:p>ford-mustang-gt-2014</text:p>
          </table:table-cell>
          <table:table-cell office:value-type="string" office:string-value="Ford">
            <text:p>Ford</text:p>
          </table:table-cell>
          <table:table-cell office:value-type="string" office:string-value="Mustang GT">
            <text:p>Mustang GT</text:p>
          </table:table-cell>
          <table:table-cell office:value-type="float" office:value="2014">
            <text:p>2014</text:p>
          </table:table-cell>
          <table:table-cell office:value-type="string" office:string-value="ford-gt-2014">
            <text:p>ford-gt-2014</text:p>
          </table:table-cell>
        </table:table-row>
        <table:table-row>
          <table:table-cell office:value-type="string" office:string-value="toyota-celica-gt-four">
            <text:p>toyota-celica-gt-four</text:p>
          </table:table-cell>
          <table:table-cell office:value-type="string" office:string-value="Toyota">
            <text:p>Toyota</text:p>
          </table:table-cell>
          <table:table-cell office:value-type="string" office:string-value="Celica GT Four">
            <text:p>Celica GT Four</text:p>
          </table:table-cell>
          <table:table-cell office:value-type="float" office:value="1992">
            <text:p>1992</text:p>
          </table:table-cell>
          <table:table-cell office:value-type="string" office:string-value="celica-gt-four">
            <text:p>celica-gt-four</text:p>
          </table:table-cell>
        </table:table-row>
        <table:table-row>
          <table:table-cell office:value-type="string" office:string-value="subaru-varis-wrx-sti">
            <text:p>subaru-varis-wrx-sti</text:p>
          </table:table-cell>
          <table:table-cell office:value-type="string" office:string-value="Subaru">
            <text:p>Subaru</text:p>
          </table:table-cell>
          <table:table-cell office:value-type="string" office:string-value="Varis WRX STI">
            <text:p>Varis WRX STI</text:p>
          </table:table-cell>
          <table:table-cell office:value-type="float" office:value="2016">
            <text:p>2016</text:p>
          </table:table-cell>
          <table:table-cell office:value-type="string" office:string-value="varis-wrx-sti">
            <text:p>varis-wrx-sti</text:p>
          </table:table-cell>
        </table:table-row>
        <table:table-row>
          <table:table-cell office:value-type="string" office:string-value="porsche-718-cayman-gt4-rs">
            <text:p>porsche-718-cayman-gt4-rs</text:p>
          </table:table-cell>
          <table:table-cell office:value-type="string" office:string-value="Porsche">
            <text:p>Porsche</text:p>
          </table:table-cell>
          <table:table-cell office:value-type="string" office:string-value="718 Cayman GT4 RS">
            <text:p>718 Cayman GT4 RS</text:p>
          </table:table-cell>
          <table:table-cell office:value-type="float" office:value="2023">
            <text:p>2023</text:p>
          </table:table-cell>
          <table:table-cell office:value-type="string" office:string-value="718-cayman-gt4-rs">
            <text:p>718-cayman-gt4-rs</text:p>
          </table:table-cell>
        </table:table-row>
        <table:table-row>
          <table:table-cell office:value-type="string" office:string-value="mitsubishi-3000gt-vr4">
            <text:p>mitsubishi-3000gt-vr4</text:p>
          </table:table-cell>
          <table:table-cell office:value-type="string" office:string-value="Mitsubishi">
            <text:p>Mitsubishi</text:p>
          </table:table-cell>
          <table:table-cell office:value-type="string" office:string-value="3000GT VR4">
            <text:p>3000GT VR4</text:p>
          </table:table-cell>
          <table:table-cell office:value-type="float" office:value="1998">
            <text:p>1998</text:p>
          </table:table-cell>
          <table:table-cell office:value-type="string" office:string-value="3000gt-vr4">
            <text:p>3000gt-vr4</text:p>
          </table:table-cell>
        </table:table-row>
        <table:table-row>
          <table:table-cell office:value-type="string" office:string-value="ferrari-sf90-stradale">
            <text:p>ferrari-sf90-stradale</text:p>
          </table:table-cell>
          <table:table-cell office:value-type="string" office:string-value="Ferrari">
            <text:p>Ferrari</text:p>
          </table:table-cell>
          <table:table-cell office:value-type="string" office:string-value="SF90 Stradale">
            <text:p>SF90 Stradale</text:p>
          </table:table-cell>
          <table:table-cell office:value-type="float" office:value="2019">
            <text:p>2019</text:p>
          </table:table-cell>
          <table:table-cell office:value-type="string" office:string-value="sf90-stralade">
            <text:p>sf90-stralad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